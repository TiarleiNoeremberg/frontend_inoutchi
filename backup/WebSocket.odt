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Inter" svg:font-family="Inter, apple-system, BlinkMacSystemFont, 'San Francisco', 'Segoe UI', Roboto, 'Helvetica Neue', sans-serif"/>
    <style:font-face style:name="Lato" svg:font-family="Lato"/>
    <style:font-face style:name="Lato Black" svg:font-family="'Lato Bl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829cm"/>
    </style:style>
    <style:style style:name="Tabela1.B" style:family="table-column">
      <style:table-column-properties style:column-width="3.519cm"/>
    </style:style>
    <style:style style:name="Tabela1.C" style:family="table-column">
      <style:table-column-properties style:column-width="5.946cm"/>
    </style:style>
    <style:style style:name="Tabela1.D" style:family="table-column">
      <style:table-column-properties style:column-width="3.706cm"/>
    </style:style>
    <style:style style:name="Tabela1.A1" style:family="table-cell">
      <style:table-cell-properties style:vertical-align="middle" fo:background-color="#f4f4f4" fo:padding="0.212cm" fo:border-left="0.05pt solid #dddddd" fo:border-right="0.05pt solid #dddddd" fo:border-top="7.5pt solid #dddddd" fo:border-bottom="0.05pt solid #dddddd">
        <style:background-image/>
      </style:table-cell-properties>
    </style:style>
    <style:style style:name="Tabela1.B1" style:family="table-cell">
      <style:table-cell-properties style:vertical-align="middle" fo:background-color="#f4f4f4" fo:padding="0.212cm" fo:border="0.05pt solid #dddddd">
        <style:background-image/>
      </style:table-cell-properties>
    </style:style>
    <style:style style:name="Tabela1.A2" style:family="table-cell">
      <style:table-cell-properties style:vertical-align="middle" fo:padding="0.212cm" fo:border="0.05pt solid #dddddd"/>
    </style:style>
    <style:style style:name="Tabela1.B2" style:family="table-cell">
      <style:table-cell-properties style:vertical-align="middle" fo:padding="0.212cm" fo:border="0.05pt solid #dddddd"/>
    </style:style>
    <style:style style:name="Tabela1.C2" style:family="table-cell">
      <style:table-cell-properties style:vertical-align="middle" fo:padding="0.212cm" fo:border="0.05pt solid #dddddd"/>
    </style:style>
    <style:style style:name="Tabela1.D2" style:family="table-cell">
      <style:table-cell-properties style:vertical-align="middle" fo:padding="0.212cm" fo:border="0.05pt solid #dddddd"/>
    </style:style>
    <style:style style:name="Tabela1.3" style:family="table-row">
      <style:table-row-properties fo:background-color="#f6f6f6">
        <style:background-image/>
      </style:table-row-properties>
    </style:style>
    <style:style style:name="Tabela1.A3" style:family="table-cell">
      <style:table-cell-properties style:vertical-align="middle" fo:padding="0.212cm" fo:border="0.05pt solid #dddddd"/>
    </style:style>
    <style:style style:name="Tabela1.B3" style:family="table-cell">
      <style:table-cell-properties style:vertical-align="middle" fo:padding="0.212cm" fo:border="0.05pt solid #dddddd"/>
    </style:style>
    <style:style style:name="Tabela1.C3" style:family="table-cell">
      <style:table-cell-properties style:vertical-align="middle" fo:padding="0.212cm" fo:border="0.05pt solid #dddddd"/>
    </style:style>
    <style:style style:name="Tabela1.D3" style:family="table-cell">
      <style:table-cell-properties style:vertical-align="middle" fo:padding="0.212cm" fo:border="0.05pt solid #dddddd"/>
    </style:style>
    <style:style style:name="Tabela1.A4" style:family="table-cell">
      <style:table-cell-properties style:vertical-align="middle" fo:padding="0.212cm" fo:border="0.05pt solid #dddddd"/>
    </style:style>
    <style:style style:name="Tabela1.B4" style:family="table-cell">
      <style:table-cell-properties style:vertical-align="middle" fo:padding="0.212cm" fo:border="0.05pt solid #dddddd"/>
    </style:style>
    <style:style style:name="Tabela1.C4" style:family="table-cell">
      <style:table-cell-properties style:vertical-align="middle" fo:padding="0.212cm" fo:border="0.05pt solid #dddddd"/>
    </style:style>
    <style:style style:name="Tabela1.D4" style:family="table-cell">
      <style:table-cell-properties style:vertical-align="middle" fo:padding="0.212cm" fo:border="0.05pt solid #dddddd"/>
    </style:style>
    <style:style style:name="Tabela1.A5" style:family="table-cell">
      <style:table-cell-properties style:vertical-align="middle" fo:padding="0.212cm" fo:border="0.05pt solid #dddddd"/>
    </style:style>
    <style:style style:name="Tabela1.B5" style:family="table-cell">
      <style:table-cell-properties style:vertical-align="middle" fo:padding="0.212cm" fo:border="0.05pt solid #dddddd"/>
    </style:style>
    <style:style style:name="Tabela1.C5" style:family="table-cell">
      <style:table-cell-properties style:vertical-align="middle" fo:padding="0.212cm" fo:border="0.05pt solid #dddddd"/>
    </style:style>
    <style:style style:name="Tabela1.D5" style:family="table-cell">
      <style:table-cell-properties style:vertical-align="middle" fo:padding="0.212cm" fo:border="0.05pt solid #dddddd"/>
    </style:style>
    <style:style style:name="Tabela1.A6" style:family="table-cell">
      <style:table-cell-properties style:vertical-align="middle" fo:padding="0.212cm" fo:border="0.05pt solid #dddddd"/>
    </style:style>
    <style:style style:name="Tabela1.B6" style:family="table-cell">
      <style:table-cell-properties style:vertical-align="middle" fo:padding="0.212cm" fo:border="0.05pt solid #dddddd"/>
    </style:style>
    <style:style style:name="Tabela1.C6" style:family="table-cell">
      <style:table-cell-properties style:vertical-align="middle" fo:padding="0.212cm" fo:border="0.05pt solid #dddddd"/>
    </style:style>
    <style:style style:name="Tabela1.D6" style:family="table-cell">
      <style:table-cell-properties style:vertical-align="middle" fo:padding="0.212cm" fo:border="0.05pt solid #dddddd"/>
    </style:style>
    <style:style style:name="Tabela1.A7" style:family="table-cell">
      <style:table-cell-properties style:vertical-align="middle" fo:padding-left="0cm" fo:padding-right="0.212cm" fo:padding-top="0.212cm" fo:padding-bottom="0cm" fo:border-left="none" fo:border-right="0.05pt solid #dddddd" fo:border-top="0.05pt solid #dddddd" fo:border-bottom="none"/>
    </style:style>
    <style:style style:name="Tabela1.B7" style:family="table-cell">
      <style:table-cell-properties style:vertical-align="middle" fo:padding-left="0cm" fo:padding-right="0.212cm" fo:padding-top="0.212cm" fo:padding-bottom="0cm" fo:border-left="none" fo:border-right="0.05pt solid #dddddd" fo:border-top="0.05pt solid #dddddd" fo:border-bottom="none"/>
    </style:style>
    <style:style style:name="Tabela1.C7" style:family="table-cell">
      <style:table-cell-properties style:vertical-align="middle" fo:padding-left="0cm" fo:padding-right="0.212cm" fo:padding-top="0.212cm" fo:padding-bottom="0cm" fo:border-left="none" fo:border-right="0.05pt solid #dddddd" fo:border-top="0.05pt solid #dddddd" fo:border-bottom="none"/>
    </style:style>
    <style:style style:name="Tabela1.D7" style:family="table-cell">
      <style:table-cell-properties style:vertical-align="middle" fo:padding-left="0cm" fo:padding-right="0.212cm" fo:padding-top="0.212cm" fo:padding-bottom="0cm" fo:border-left="none" fo:border-right="0.05pt solid #dddddd" fo:border-top="0.05pt solid #dddddd" fo:border-bottom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004cm"/>
    </style:style>
    <style:style style:name="Tabela2.B" style:family="table-column">
      <style:table-column-properties style:column-width="4.357cm"/>
    </style:style>
    <style:style style:name="Tabela2.C" style:family="table-column">
      <style:table-column-properties style:column-width="8.64cm"/>
    </style:style>
    <style:style style:name="Tabela2.A1" style:family="table-cell">
      <style:table-cell-properties style:vertical-align="middle" fo:background-color="#f4f4f4" fo:padding="0.212cm" fo:border-left="0.05pt solid #dddddd" fo:border-right="0.05pt solid #dddddd" fo:border-top="7.5pt solid #dddddd" fo:border-bottom="0.05pt solid #dddddd">
        <style:background-image/>
      </style:table-cell-properties>
    </style:style>
    <style:style style:name="Tabela2.B1" style:family="table-cell">
      <style:table-cell-properties style:vertical-align="middle" fo:background-color="#f4f4f4" fo:padding="0.212cm" fo:border="0.05pt solid #dddddd">
        <style:background-image/>
      </style:table-cell-properties>
    </style:style>
    <style:style style:name="Tabela2.A2" style:family="table-cell">
      <style:table-cell-properties style:vertical-align="middle" fo:padding="0.212cm" fo:border="0.05pt solid #dddddd"/>
    </style:style>
    <style:style style:name="Tabela2.B2" style:family="table-cell">
      <style:table-cell-properties style:vertical-align="middle" fo:padding="0.212cm" fo:border="0.05pt solid #dddddd"/>
    </style:style>
    <style:style style:name="Tabela2.C2" style:family="table-cell">
      <style:table-cell-properties style:vertical-align="middle" fo:padding="0.212cm" fo:border="0.05pt solid #dddddd"/>
    </style:style>
    <style:style style:name="Tabela2.3" style:family="table-row">
      <style:table-row-properties fo:background-color="#f6f6f6">
        <style:background-image/>
      </style:table-row-properties>
    </style:style>
    <style:style style:name="Tabela2.A3" style:family="table-cell">
      <style:table-cell-properties style:vertical-align="middle" fo:padding="0.212cm" fo:border="0.05pt solid #dddddd"/>
    </style:style>
    <style:style style:name="Tabela2.B3" style:family="table-cell">
      <style:table-cell-properties style:vertical-align="middle" fo:padding="0.212cm" fo:border="0.05pt solid #dddddd"/>
    </style:style>
    <style:style style:name="Tabela2.C3" style:family="table-cell">
      <style:table-cell-properties style:vertical-align="middle" fo:padding="0.212cm" fo:border="0.05pt solid #dddddd"/>
    </style:style>
    <style:style style:name="Tabela2.A4" style:family="table-cell">
      <style:table-cell-properties style:vertical-align="middle" fo:padding-left="0cm" fo:padding-right="0.212cm" fo:padding-top="0.212cm" fo:padding-bottom="0cm" fo:border-left="none" fo:border-right="0.05pt solid #dddddd" fo:border-top="0.05pt solid #dddddd" fo:border-bottom="none"/>
    </style:style>
    <style:style style:name="Tabela2.B4" style:family="table-cell">
      <style:table-cell-properties style:vertical-align="middle" fo:padding-left="0cm" fo:padding-right="0.212cm" fo:padding-top="0.212cm" fo:padding-bottom="0cm" fo:border-left="none" fo:border-right="0.05pt solid #dddddd" fo:border-top="0.05pt solid #dddddd" fo:border-bottom="none"/>
    </style:style>
    <style:style style:name="Tabela2.C4" style:family="table-cell">
      <style:table-cell-properties style:vertical-align="middle" fo:padding-left="0cm" fo:padding-right="0.212cm" fo:padding-top="0.212cm" fo:padding-bottom="0cm" fo:border-left="none" fo:border-right="0.05pt solid #dddddd" fo:border-top="0.05pt solid #dddddd" fo:border-bottom="none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3" style:family="paragraph" style:parent-style-name="Heading_20_3">
      <style:paragraph-properties fo:margin-left="0cm" fo:margin-right="0cm" fo:margin-top="0cm" fo:margin-bottom="0.247cm" style:contextual-spacing="false" style:line-height-at-least="0.635cm" fo:orphans="2" fo:widows="2" fo:text-indent="0cm" style:auto-text-indent="false"/>
    </style:style>
    <style:style style:name="P4" style:family="paragraph" style:parent-style-name="Heading_20_4">
      <style:paragraph-properties fo:margin-left="0cm" fo:margin-right="0cm" fo:margin-top="0cm" fo:margin-bottom="0.247cm" style:contextual-spacing="false" style:line-height-at-least="0.529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01828" loext:opacity="100%" style:font-name="Inter" fo:font-size="10.5pt" fo:letter-spacing="normal" fo:font-style="normal" fo:font-weight="bold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ext_20_body" style:list-style-name="L4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16" style:family="paragraph" style:parent-style-name="Standard">
      <style:text-properties fo:color="#3f51b5" loext:opacity="100%" style:font-name="Arial Black" fo:font-size="36pt" fo:font-weight="bold" officeooo:rsid="00176c6b" officeooo:paragraph-rsid="00176c6b" style:font-size-asian="36pt" style:font-weight-asian="bold" style:font-size-complex="36pt" style:font-weight-complex="bold"/>
    </style:style>
    <style:style style:name="P17" style:family="paragraph" style:parent-style-name="Text_20_body" style:list-style-name="L7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8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8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  <style:text-properties fo:font-variant="normal" fo:text-transform="none" fo:color="#101828" loext:opacity="100%" style:font-name="Inter" fo:font-size="10.5pt" fo:letter-spacing="normal" fo:font-style="normal" fo:font-weight="bold"/>
    </style:style>
    <style:style style:name="P20" style:family="paragraph" style:parent-style-name="Text_20_body" style:list-style-name="L9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9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  <style:text-properties fo:font-variant="normal" fo:text-transform="none" fo:color="#101828" loext:opacity="100%" style:font-name="Inter" fo:font-size="10.5pt" fo:letter-spacing="normal" fo:font-style="normal" fo:font-weight="bold"/>
    </style:style>
    <style:style style:name="T1" style:family="text">
      <style:text-properties fo:font-variant="normal" fo:text-transform="none" fo:color="#000000" loext:opacity="100%" fo:font-family="'Golos Text', sans-serif" fo:font-size="12pt" fo:letter-spacing="normal" fo:font-style="normal" fo:font-weight="bold"/>
    </style:style>
    <style:style style:name="T2" style:family="text">
      <style:text-properties fo:font-variant="normal" fo:text-transform="none" fo:color="#101828" loext:opacity="100%" style:font-name="Inter" fo:font-size="10.5pt" fo:letter-spacing="normal" fo:font-style="normal" fo:font-weight="bold"/>
    </style:style>
    <style:style style:name="T3" style:family="text">
      <style:text-properties fo:font-variant="normal" fo:text-transform="none" fo:color="#49566c" loext:opacity="100%" fo:font-family="Menlo, Monaco, Consolas, 'Liberation Mono', 'Courier New', monospace" fo:font-size="9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0000" loext:opacity="100%" fo:font-family="'Golos Text', sans-serif" fo:font-size="10.5pt" fo:letter-spacing="normal" fo:font-style="normal" fo:font-weight="bold"/>
    </style:style>
    <style:style style:name="T5" style:family="text">
      <style:text-properties fo:font-weight="bold"/>
    </style:style>
    <style:style style:name="T6" style:family="text">
      <style:text-properties fo:color="#49566c" loext:opacity="100%" fo:font-family="Menlo, Monaco, Consolas, 'Liberation Mono', 'Courier New', monospace" fo:font-size="9pt" loext:padding="0cm" loext:border="none"/>
    </style:style>
    <style:style style:name="T7" style:family="text">
      <style:text-properties fo:font-variant="normal" fo:text-transform="none" fo:color="#101828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1. Atores que se Conectam via WebSocket</text:span></text:span></text:h>
      <text:p text:style-name="P1"><text:span text:style-name="T2">Com base no arquivo de configuração </text:span><text:span text:style-name="Source_20_Text"><text:span text:style-name="T3">WebSocketConfig.java</text:span></text:span><text:span text:style-name="T2">, os seguintes "atores" estabelecem uma conexão WebSocket com o sistema:</text:span></text:p>
      <text:list text:style-name="L1">
        <text:list-item>
          <text:p text:style-name="P2"><text:span text:style-name="Strong_20_Emphasis"><text:span text:style-name="T2">SALA:</text:span></text:span><text:span text:style-name="T2"> Conecta-se ao endpoint </text:span><text:span text:style-name="Source_20_Text"><text:span text:style-name="T3">/ws-sala</text:span></text:span><text:span text:style-name="T2">. É o principal receptor de eventos em tempo real sobre os alunos.</text:span></text:p>
        </text:list-item>
        <text:list-item>
          <text:p text:style-name="P2"><text:span text:style-name="Strong_20_Emphasis"><text:span text:style-name="T2">DIRETOR:</text:span></text:span><text:span text:style-name="T2"> Conecta-se ao endpoint </text:span><text:span text:style-name="Source_20_Text"><text:span text:style-name="T3">/ws-diretor</text:span></text:span><text:span text:style-name="T2">. Recebe notificações gerais sobre o que acontece na escola.</text:span></text:p>
        </text:list-item>
        <text:list-item>
          <text:p text:style-name="P2"><text:span text:style-name="Strong_20_Emphasis"><text:span text:style-name="T2">TUTOR (Responsável):</text:span></text:span><text:span text:style-name="T2"> Conecta-se ao endpoint </text:span><text:span text:style-name="Source_20_Text"><text:span text:style-name="T3">/ws-tutor</text:span></text:span><text:span text:style-name="T2">. Este endpoint existe, mas, pela análise do fluxo de notificações, o Tutor parece atuar mais como um </text:span><text:span text:style-name="Emphasis"><text:span text:style-name="T2">iniciador</text:span></text:span><text:span text:style-name="T2"> de ações (via requisições HTTP) do que como um </text:span><text:span text:style-name="Emphasis"><text:span text:style-name="T2">receptor</text:span></text:span><text:span text:style-name="T2"> de eventos contínuos via WebSocket no backend.</text:span></text:p>
        </text:list-item>
      </text:list>
      <text:p text:style-name="P1"><text:span text:style-name="T2">O </text:span><text:span text:style-name="Strong_20_Emphasis"><text:span text:style-name="T2">TRANSPORTADOR</text:span></text:span><text:span text:style-name="T2"> não possui um endpoint WebSocket dedicado. Ele interage com o sistema através de requisições HTTP (para registrar entradas/saídas em lote), e essas ações </text:span><text:span text:style-name="Strong_20_Emphasis"><text:span text:style-name="T2">desencadeiam</text:span></text:span><text:span text:style-name="T2"> mensagens WebSocket para os outros atores (Sala e Diretor).</text:span></text:p>
      <text:p text:style-name="Horizontal_20_Line"/>
      <text:h text:style-name="P3" text:outline-level="3"><text:span text:style-name="Strong_20_Emphasis"><text:span text:style-name="T1">2. Ações Mapeadas para Comunicação WebSocket</text:span></text:span></text:h>
      <text:p text:style-name="P1"><text:span text:style-name="T2">As ações são orquestradas por dois serviços principais: </text:span><text:span text:style-name="Source_20_Text"><text:span text:style-name="T3">SalaWebSocketService</text:span></text:span><text:span text:style-name="T2"> (para a Sala) e </text:span><text:span text:style-name="Source_20_Text"><text:span text:style-name="T3">WebSocketNotificationService</text:span></text:span><text:span text:style-name="T2"> (para os Diretores).</text:span></text:p>
      <text:h text:style-name="P4" text:outline-level="4"><text:span text:style-name="Strong_20_Emphasis"><text:span text:style-name="T4">Ações que a SALA Recebe (</text:span></text:span><text:span text:style-name="Strong_20_Emphasis"><text:span text:style-name="Source_20_Text"><text:span text:style-name="T3">/topic/sala/{id}</text:span></text:span></text:span><text:span text:style-name="Strong_20_Emphasis"><text:span text:style-name="T4">):</text:span></text:span></text:h>
      <text:p text:style-name="P5">O Dashboard da Sala é o mais movimentado e reage aos seguintes eventos:</text:p>
      <text:list text:style-name="L2">
        <text:list-item>
          <text:p text:style-name="P6"><text:span text:style-name="Strong_20_Emphasis"><text:span text:style-name="T2">Entrada de Aluno:</text:span></text:span></text:p>
          <text:list>
            <text:list-item>
              <text:p text:style-name="P7"><text:span text:style-name="Strong_20_Emphasis"><text:span text:style-name="T2">O que acontece:</text:span></text:span><text:span text:style-name="T2"> Quando uma entrada é registrada (pelo Transportador ou Diretor), o </text:span><text:span text:style-name="Source_20_Text"><text:span text:style-name="T3">PresencaService</text:span></text:span><text:span text:style-name="T2"> chama o </text:span><text:span text:style-name="Source_20_Text"><text:span text:style-name="T3">salaWebSocketService</text:span></text:span><text:span text:style-name="T2"> para notificar.</text:span></text:p>
            </text:list-item>
            <text:list-item>
              <text:p text:style-name="P7"><text:span text:style-name="Strong_20_Emphasis"><text:span text:style-name="T2">Ação Mapeada:</text:span></text:span><text:span text:style-name="T2"> </text:span><text:span text:style-name="Source_20_Text"><text:span text:style-name="T3">notificarNovaChamada</text:span></text:span><text:span text:style-name="T2"> com o tipo </text:span><text:span text:style-name="Source_20_Text"><text:span text:style-name="T3">ENTRADA_ALUNO</text:span></text:span><text:span text:style-name="T2">.</text:span></text:p>
            </text:list-item>
          </text:list>
        </text:list-item>
        <text:list-item>
          <text:p text:style-name="P6"><text:span text:style-name="Strong_20_Emphasis"><text:span text:style-name="T2">Solicitação de Saída (Pendente):</text:span></text:span></text:p>
          <text:list>
            <text:list-item>
              <text:p text:style-name="P7"><text:span text:style-name="Strong_20_Emphasis"><text:span text:style-name="T2">O que acontece:</text:span></text:span><text:span text:style-name="T2"> Quando um Tutor, Transportador ou outro responsável solicita a saída de um aluno, o </text:span><text:span text:style-name="Source_20_Text"><text:span text:style-name="T3">PresencaService</text:span></text:span><text:span text:style-name="T2"> ou </text:span><text:span text:style-name="Source_20_Text"><text:span text:style-name="T3">MonitoramentoSaidaService</text:span></text:span><text:span text:style-name="T2"> é acionado.</text:span></text:p>
            </text:list-item>
            <text:list-item>
              <text:p text:style-name="P7"><text:span text:style-name="Strong_20_Emphasis"><text:span text:style-name="T2">Ação Mapeada:</text:span></text:span><text:span text:style-name="T2"> </text:span><text:span text:style-name="Source_20_Text"><text:span text:style-name="T3">notificarSaidaPendente</text:span></text:span><text:span text:style-name="T2">. A sala exibe o aluno com o status "Aguardando Confirmação".</text:span></text:p>
            </text:list-item>
          </text:list>
        </text:list-item>
        <text:list-item>
          <text:p text:style-name="P6"><text:span text:style-name="Strong_20_Emphasis"><text:span text:style-name="T2">Confirmação de Saída:</text:span></text:span></text:p>
          <text:list>
            <text:list-item>
              <text:p text:style-name="P7"><text:span text:style-name="Strong_20_Emphasis"><text:span text:style-name="T2">O que acontece:</text:span></text:span><text:span text:style-name="T2"> Quando o Diretor confirma a liberação de um aluno no painel ou o Transportador confirma o embarque.</text:span></text:p>
            </text:list-item>
            <text:list-item>
              <text:p text:style-name="P7"><text:span text:style-name="Strong_20_Emphasis"><text:span text:style-name="T2">Ação Mapeada:</text:span></text:span><text:span text:style-name="T2"> </text:span><text:span text:style-name="Source_20_Text"><text:span text:style-name="T3">notificarSaidaConfirmada</text:span></text:span><text:span text:style-name="T2">. A sala atualiza o status do aluno, indicando que ele já saiu.</text:span></text:p>
            </text:list-item>
          </text:list>
        </text:list-item>
        <text:list-item>
          <text:p text:style-name="P6"><text:soft-page-break/><text:span text:style-name="Strong_20_Emphasis"><text:span text:style-name="T2">Cancelamento de Chamada:</text:span></text:span></text:p>
          <text:list>
            <text:list-item>
              <text:p text:style-name="P7"><text:span text:style-name="Strong_20_Emphasis"><text:span text:style-name="T2">O que acontece:</text:span></text:span><text:span text:style-name="T2"> Se uma solicitação de saída é cancelada pelo Diretor.</text:span></text:p>
            </text:list-item>
            <text:list-item>
              <text:p text:style-name="P7"><text:span text:style-name="Strong_20_Emphasis"><text:span text:style-name="T2">Ação Mapeada:</text:span></text:span><text:span text:style-name="T2"> </text:span><text:span text:style-name="Source_20_Text"><text:span text:style-name="T3">notificarCancelamentoChamada</text:span></text:span><text:span text:style-name="T2">. A sala remove o status "Aguardando Confirmação" do aluno.</text:span></text:p>
            </text:list-item>
          </text:list>
        </text:list-item>
        <text:list-item>
          <text:p text:style-name="P6"><text:span text:style-name="Strong_20_Emphasis"><text:span text:style-name="T2">Ativação/Desativação da Sala:</text:span></text:span></text:p>
          <text:list>
            <text:list-item>
              <text:p text:style-name="P7"><text:span text:style-name="Strong_20_Emphasis"><text:span text:style-name="T2">O que acontece:</text:span></text:span><text:span text:style-name="T2"> Quando o painel da sala é aberto ou fechado, ele envia uma mensagem para o backend para se registrar como "ativo".</text:span></text:p>
            </text:list-item>
            <text:list-item>
              <text:p text:style-name="P7"><text:span text:style-name="Strong_20_Emphasis"><text:span text:style-name="T2">Ação Mapeada:</text:span></text:span><text:span text:style-name="T2"> O </text:span><text:span text:style-name="Source_20_Text"><text:span text:style-name="T3">SalaWebSocketController</text:span></text:span><text:span text:style-name="T2"> recebe a mensagem em </text:span><text:span text:style-name="Source_20_Text"><text:span text:style-name="T3">@MessageMapping("/sala/ativar")</text:span></text:span><text:span text:style-name="T2"> e notifica todos os interessados no tópico </text:span><text:span text:style-name="Source_20_Text"><text:span text:style-name="T3">/topic/sala/status</text:span></text:span><text:span text:style-name="T2">.</text:span></text:p>
            </text:list-item>
          </text:list>
        </text:list-item>
      </text:list>
      <text:h text:style-name="P4" text:outline-level="4"><text:span text:style-name="Strong_20_Emphasis"><text:span text:style-name="T4">Ações que o DIRETOR Recebe (</text:span></text:span><text:span text:style-name="Strong_20_Emphasis"><text:span text:style-name="Source_20_Text"><text:span text:style-name="T3">/topic/escola/{id}</text:span></text:span></text:span><text:span text:style-name="Strong_20_Emphasis"><text:span text:style-name="T4">):</text:span></text:span></text:h>
      <text:p text:style-name="P5">O Dashboard do Diretor recebe uma visão mais geral dos eventos críticos da escola:</text:p>
      <text:list text:style-name="L3">
        <text:list-item>
          <text:p text:style-name="P8"><text:span text:style-name="Strong_20_Emphasis"><text:span text:style-name="T2">Entrada de Aluno:</text:span></text:span></text:p>
          <text:list>
            <text:list-item>
              <text:p text:style-name="P9"><text:span text:style-name="Strong_20_Emphasis"><text:span text:style-name="T2">O que acontece:</text:span></text:span><text:span text:style-name="T2"> Quando uma entrada de aluno é processada, o </text:span><text:span text:style-name="Source_20_Text"><text:span text:style-name="T3">PresencaService</text:span></text:span><text:span text:style-name="T2"> utiliza o </text:span><text:span text:style-name="Source_20_Text"><text:span text:style-name="T3">WebSocketNotificationService</text:span></text:span><text:span text:style-name="T2">.</text:span></text:p>
            </text:list-item>
            <text:list-item>
              <text:p text:style-name="P9"><text:span text:style-name="Strong_20_Emphasis"><text:span text:style-name="T2">Ação Mapeada:</text:span></text:span><text:span text:style-name="T2"> </text:span><text:span text:style-name="Source_20_Text"><text:span text:style-name="T3">notificarDiretoresDaEscola</text:span></text:span><text:span text:style-name="T2"> com uma notificação do tipo </text:span><text:span text:style-name="Source_20_Text"><text:span text:style-name="T3">ENTRADA_ALUNO</text:span></text:span><text:span text:style-name="T2">.</text:span></text:p>
            </text:list-item>
          </text:list>
        </text:list-item>
        <text:list-item>
          <text:p text:style-name="P8"><text:span text:style-name="Strong_20_Emphasis"><text:span text:style-name="T2">Criação de Chamada de Saída:</text:span></text:span></text:p>
          <text:list>
            <text:list-item>
              <text:p text:style-name="P9"><text:span text:style-name="Strong_20_Emphasis"><text:span text:style-name="T2">O que acontece:</text:span></text:span><text:span text:style-name="T2"> Quando um Tutor ou Transportador solicita a saída de um aluno, uma "chamada ativa" é criada.</text:span></text:p>
            </text:list-item>
            <text:list-item>
              <text:p text:style-name="P9"><text:span text:style-name="Strong_20_Emphasis"><text:span text:style-name="T2">Ação Mapeada:</text:span></text:span><text:span text:style-name="T2"> </text:span><text:span text:style-name="Source_20_Text"><text:span text:style-name="T3">notificarDiretoresDaEscola</text:span></text:span><text:span text:style-name="T2"> com uma notificação do tipo </text:span><text:span text:style-name="Source_20_Text"><text:span text:style-name="T3">CHAMADA_ATIVA_CRIADA</text:span></text:span><text:span text:style-name="T2">, alertando o diretor que há um novo pedido de saída para aprovação.</text:span></text:p>
            </text:list-item>
          </text:list>
        </text:list-item>
      </text:list>
      <text:h text:style-name="P3" text:outline-level="3"><text:span text:style-name="Strong_20_Emphasis"><text:span text:style-name="T1">Resumo em Tabela</text:span>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0">Evento no Sistema</text:p>
            </table:table-cell>
            <table:table-cell table:style-name="Tabela1.B1" office:value-type="string">
              <text:p text:style-name="P10">Quem Dispara a Ação?</text:p>
            </table:table-cell>
            <table:table-cell table:style-name="Tabela1.B1" office:value-type="string">
              <text:p text:style-name="P10">Ação no Backend (Função)</text:p>
            </table:table-cell>
            <table:table-cell table:style-name="Tabela1.A1" office:value-type="string">
              <text:p text:style-name="P10">Quem Recebe a Notificação?</text:p>
            </table:table-cell>
          </table:table-row>
        </table:table-header-rows>
        <table:table-row>
          <table:table-cell table:style-name="Tabela1.A2" office:value-type="string">
            <text:p text:style-name="P11"><text:span text:style-name="Strong_20_Emphasis"><text:span text:style-name="T5">Registro de Entrada</text:span></text:span></text:p>
          </table:table-cell>
          <table:table-cell table:style-name="Tabela1.B2" office:value-type="string">
            <text:p text:style-name="P11">Transportador, Diretor</text:p>
          </table:table-cell>
          <table:table-cell table:style-name="Tabela1.C2" office:value-type="string">
            <text:p text:style-name="P11"><text:span text:style-name="Source_20_Text"><text:span text:style-name="T6">notificarEntradaAlunoViaWebSocket</text:span></text:span></text:p>
          </table:table-cell>
          <table:table-cell table:style-name="Tabela1.D2" office:value-type="string">
            <text:p text:style-name="P11"><text:span text:style-name="Strong_20_Emphasis"><text:span text:style-name="T5">Sala</text:span></text:span> e <text:span text:style-name="Strong_20_Emphasis"><text:span text:style-name="T5">Diretor</text:span></text:span></text:p>
          </table:table-cell>
        </table:table-row>
        <table:table-row table:style-name="Tabela1.3">
          <table:table-cell table:style-name="Tabela1.A3" office:value-type="string">
            <text:p text:style-name="P11"><text:span text:style-name="Strong_20_Emphasis"><text:span text:style-name="T5">Solicitação de Saída</text:span></text:span></text:p>
          </table:table-cell>
          <table:table-cell table:style-name="Tabela1.B3" office:value-type="string">
            <text:p text:style-name="P11">Tutor, Transportador</text:p>
          </table:table-cell>
          <table:table-cell table:style-name="Tabela1.C3" office:value-type="string">
            <text:p text:style-name="P11"><text:span text:style-name="Source_20_Text"><text:span text:style-name="T6">notificarSalaSaidaPendente</text:span></text:span></text:p>
          </table:table-cell>
          <table:table-cell table:style-name="Tabela1.D3" office:value-type="string">
            <text:p text:style-name="P11"><text:span text:style-name="Strong_20_Emphasis"><text:span text:style-name="T5">Sala</text:span></text:span></text:p>
          </table:table-cell>
        </table:table-row>
        <table:table-row>
          <table:table-cell table:style-name="Tabela1.A4" office:value-type="string">
            <text:p text:style-name="P11"><text:span text:style-name="Strong_20_Emphasis"><text:span text:style-name="T5">Criação da Chamada Ativa</text:span></text:span></text:p>
          </table:table-cell>
          <table:table-cell table:style-name="Tabela1.B4" office:value-type="string">
            <text:p text:style-name="P11">Tutor, Transportador</text:p>
          </table:table-cell>
          <table:table-cell table:style-name="Tabela1.C4" office:value-type="string">
            <text:p text:style-name="P11"><text:span text:style-name="Source_20_Text"><text:span text:style-name="T6">notificarDiretoresDaEscola</text:span></text:span></text:p>
          </table:table-cell>
          <table:table-cell table:style-name="Tabela1.D4" office:value-type="string">
            <text:p text:style-name="P11"><text:span text:style-name="Strong_20_Emphasis"><text:span text:style-name="T5">Diretor</text:span></text:span></text:p>
          </table:table-cell>
        </table:table-row>
        <table:table-row table:style-name="Tabela1.3">
          <table:table-cell table:style-name="Tabela1.A5" office:value-type="string">
            <text:p text:style-name="P11"><text:span text:style-name="Strong_20_Emphasis"><text:span text:style-name="T5">Confirmação da Saída</text:span></text:span></text:p>
          </table:table-cell>
          <table:table-cell table:style-name="Tabela1.B5" office:value-type="string">
            <text:p text:style-name="P11">Diretor, Transportador</text:p>
          </table:table-cell>
          <table:table-cell table:style-name="Tabela1.C5" office:value-type="string">
            <text:p text:style-name="P11"><text:span text:style-name="Source_20_Text"><text:span text:style-name="T6">notificarSaidaConfirmada</text:span></text:span></text:p>
          </table:table-cell>
          <table:table-cell table:style-name="Tabela1.D5" office:value-type="string">
            <text:p text:style-name="P11"><text:span text:style-name="Strong_20_Emphasis"><text:span text:style-name="T5">Sala</text:span></text:span></text:p>
          </table:table-cell>
        </table:table-row>
        <table:table-row>
          <table:table-cell table:style-name="Tabela1.A6" office:value-type="string">
            <text:p text:style-name="P11"><text:span text:style-name="Strong_20_Emphasis"><text:span text:style-name="T5">Cancelamento da </text:span></text:span><text:soft-page-break/><text:span text:style-name="Strong_20_Emphasis"><text:span text:style-name="T5">Saída</text:span></text:span></text:p>
          </table:table-cell>
          <table:table-cell table:style-name="Tabela1.B6" office:value-type="string">
            <text:p text:style-name="P11">Diretor</text:p>
          </table:table-cell>
          <table:table-cell table:style-name="Tabela1.C6" office:value-type="string">
            <text:p text:style-name="P11"><text:span text:style-name="Source_20_Text"><text:span text:style-name="T6">notificarCancelamentoChamada</text:span></text:span></text:p>
          </table:table-cell>
          <table:table-cell table:style-name="Tabela1.D6" office:value-type="string">
            <text:p text:style-name="P11"><text:span text:style-name="Strong_20_Emphasis"><text:span text:style-name="T5">Sala</text:span></text:span></text:p>
          </table:table-cell>
        </table:table-row>
        <table:table-row table:style-name="Tabela1.3">
          <table:table-cell table:style-name="Tabela1.A7" office:value-type="string">
            <text:p text:style-name="P11"><text:span text:style-name="Strong_20_Emphasis"><text:span text:style-name="T5">Abertura do Painel da Sala</text:span></text:span></text:p>
          </table:table-cell>
          <table:table-cell table:style-name="Tabela1.B7" office:value-type="string">
            <text:p text:style-name="P11">Sala</text:p>
          </table:table-cell>
          <table:table-cell table:style-name="Tabela1.C7" office:value-type="string">
            <text:p text:style-name="P11"><text:span text:style-name="Source_20_Text"><text:span text:style-name="T6">@MessageMapping("/sala/ativar")</text:span></text:span></text:p>
          </table:table-cell>
          <table:table-cell table:style-name="Tabela1.D7" office:value-type="string">
            <text:p text:style-name="P12">Outros sistemas (se houver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Confirmo, com base na minha análise do </text:span><text:span text:style-name="Source_20_Text"><text:span text:style-name="T3">codigo_completo_0902.txt</text:span></text:span><text:span text:style-name="T2">, os seguintes pontos:</text:span></text:p>
      <text:p text:style-name="Horizontal_20_Line"/>
      <text:h text:style-name="P3" text:outline-level="3"><text:span text:style-name="Strong_20_Emphasis"><text:span text:style-name="T1">1. Entrada em Lote (Checkbox)</text:span></text:span></text:h>
      <text:list text:style-name="L4">
        <text:list-item>
          <text:p text:style-name="P13"><text:span text:style-name="Strong_20_Emphasis"><text:span text:style-name="T2">Seu Relato:</text:span></text:span><text:span text:style-name="T2"> Não atualiza a sala instantaneamente.</text:span></text:p>
        </text:list-item>
        <text:list-item>
          <text:p text:style-name="P13"><text:span text:style-name="Strong_20_Emphasis"><text:span text:style-name="T2">Análise do Código:</text:span></text:span><text:span text:style-name="T2"> </text:span><text:span text:style-name="Strong_20_Emphasis"><text:span text:style-name="T2">Você está parcialmente correto.</text:span></text:span><text:span text:style-name="T2"> O código, na verdade, </text:span><text:span text:style-name="Strong_20_Emphasis"><text:span text:style-name="T2">TENTA</text:span></text:span><text:span text:style-name="T2"> notificar. A função </text:span><text:span text:style-name="Source_20_Text"><text:span text:style-name="T3">registrarEntradaEmLote</text:span></text:span><text:span text:style-name="T2"> no </text:span><text:span text:style-name="Source_20_Text"><text:span text:style-name="T3">TransporteChamadaService</text:span></text:span><text:span text:style-name="T2"> executa um loop e, para cada aluno, chama a função </text:span><text:span text:style-name="Source_20_Text"><text:span text:style-name="T3">presencaService.registrarEntrada(...)</text:span></text:span><text:span text:style-name="T2">. Esta função, por sua vez, </text:span><text:span text:style-name="Strong_20_Emphasis"><text:span text:style-name="T2">chama sim</text:span></text:span><text:span text:style-name="T2"> o </text:span><text:span text:style-name="Source_20_Text"><text:span text:style-name="T3">notificarEntradaAlunoViaWebSocket</text:span></text:span><text:span text:style-name="T2">.</text:span></text:p>
        </text:list-item>
        <text:list-item>
          <text:p text:style-name="P13"><text:span text:style-name="Strong_20_Emphasis"><text:span text:style-name="T2">O Problema Real (Por que não funciona como esperado):</text:span></text:span><text:span text:style-name="T2"> O problema aqui é um de "design". Em vez de enviar uma única mensagem de "lote atualizado", o backend está disparando uma "enchente" de notificações individuais (uma para cada aluno) em um curtíssimo espaço de tempo. Muitos navegadores e bibliotecas WebSocket podem se "perder" ou limitar esse volume de mensagens, resultando em atualizações que não chegam ou chegam com atraso. Portanto, embora o código para notificar </text:span><text:span text:style-name="Emphasis"><text:span text:style-name="T2">exista</text:span></text:span><text:span text:style-name="T2">, o método como ele é usado em lote é ineficiente e propenso a falhas.</text:span></text:p>
        </text:list-item>
      </text:list>
      <text:h text:style-name="P3" text:outline-level="3"><text:span text:style-name="Strong_20_Emphasis"><text:span text:style-name="T1">2. Saída em Lote (Solicitação via Checkbox)</text:span></text:span></text:h>
      <text:list text:style-name="L5">
        <text:list-item>
          <text:p text:style-name="P14"><text:span text:style-name="Strong_20_Emphasis"><text:span text:style-name="T2">Seu Relato:</text:span></text:span><text:span text:style-name="T2"> Não atualiza a sala instantaneamente.</text:span></text:p>
        </text:list-item>
        <text:list-item>
          <text:p text:style-name="P14"><text:span text:style-name="Strong_20_Emphasis"><text:span text:style-name="T2">Análise do Código:</text:span></text:span><text:span text:style-name="T2"> A mesma situação da entrada em lote. A função </text:span><text:span text:style-name="Source_20_Text"><text:span text:style-name="T3">solicitarSaidaEmLote</text:span></text:span><text:span text:style-name="T2"> chama, em um loop, o serviço </text:span><text:span text:style-name="Source_20_Text"><text:span text:style-name="T3">monitoramentoSaidaService.criarChamadaAtiva(...)</text:span></text:span><text:span text:style-name="T2">, que por sua vez chama </text:span><text:span text:style-name="Source_20_Text"><text:span text:style-name="T3">salaWebSocketService.notificarSaidaPendente(...)</text:span></text:span><text:span text:style-name="T2">. Novamente, o código para notificar </text:span><text:span text:style-name="Strong_20_Emphasis"><text:span text:style-name="T2">existe</text:span></text:span><text:span text:style-name="T2">, mas o padrão de "enchente" de mensagens é o provável culpado pela falha que você observa na prática.</text:span></text:p>
        </text:list-item>
      </text:list>
      <text:h text:style-name="P3" text:outline-level="3"><text:soft-page-break/><text:span text:style-name="Strong_20_Emphasis"><text:span text:style-name="T1">3. Saída Individual (Botão "Confirmar Embarque")</text:span></text:span></text:h>
      <text:list text:style-name="L6">
        <text:list-item>
          <text:p text:style-name="P15"><text:span text:style-name="Strong_20_Emphasis"><text:span text:style-name="T2">Seu Relato:</text:span></text:span><text:span text:style-name="T2"> Não atualiza a sala instantaneamente.</text:span></text:p>
        </text:list-item>
        <text:list-item>
          <text:p text:style-name="P15"><text:span text:style-name="Strong_20_Emphasis"><text:span text:style-name="T2">Análise do Código:</text:span></text:span><text:span text:style-name="T2"> </text:span><text:span text:style-name="Strong_20_Emphasis"><text:span text:style-name="T2">Aqui sua análise está 100% correta, e este é o erro mais grave.</text:span></text:span><text:span text:style-name="T2"> A função que lida com isso é a </text:span><text:span text:style-name="Source_20_Text"><text:span text:style-name="T3">confirmarRetiradaPeloTransportador</text:span></text:span><text:span text:style-name="T2"> no </text:span><text:span text:style-name="Source_20_Text"><text:span text:style-name="T3">MonitoramentoSaidaService</text:span></text:span><text:span text:style-name="T2">. Eu tracei todo o fluxo dela: ela atualiza o status da chamada no banco de dados e retorna uma resposta HTTP. </text:span><text:span text:style-name="Strong_20_Emphasis"><text:span text:style-name="T2">Em nenhum momento ela faz uma chamada ao </text:span></text:span><text:span text:style-name="Strong_20_Emphasis"><text:span text:style-name="Source_20_Text"><text:span text:style-name="T3">salaWebSocketService</text:span></text:span></text:span><text:span text:style-name="Strong_20_Emphasis"><text:span text:style-name="T2"> para notificar a sala sobre a confirmação.</text:span></text:span></text:p>
        </text:list-item>
      </text:list>
      <text:p text:style-name="Horizontal_20_Line"/>
      <text:h text:style-name="P3" text:outline-level="3"><text:span text:style-name="Strong_20_Emphasis"><text:span text:style-name="T1">Resumo da Análise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0">Ação do Transportador</text:p>
            </table:table-cell>
            <table:table-cell table:style-name="Tabela2.B1" office:value-type="string">
              <text:p text:style-name="P10">Código de Notificação WebSocket Existe?</text:p>
            </table:table-cell>
            <table:table-cell table:style-name="Tabela2.A1" office:value-type="string">
              <text:p text:style-name="P10">Por que Falha na Prática?</text:p>
            </table:table-cell>
          </table:table-row>
        </table:table-header-rows>
        <table:table-row>
          <table:table-cell table:style-name="Tabela2.A2" office:value-type="string">
            <text:p text:style-name="P11"><text:span text:style-name="Strong_20_Emphasis"><text:span text:style-name="T5">Entrada em Lote</text:span></text:span></text:p>
          </table:table-cell>
          <table:table-cell table:style-name="Tabela2.B2" office:value-type="string">
            <text:p text:style-name="P11"><text:span text:style-name="Strong_20_Emphasis"><text:span text:style-name="T5">Sim</text:span></text:span></text:p>
          </table:table-cell>
          <table:table-cell table:style-name="Tabela2.C2" office:value-type="string">
            <text:p text:style-name="P11">O código envia uma "enchente" de mensagens individuais, o que é ineficiente e causa perda de pacotes.</text:p>
          </table:table-cell>
        </table:table-row>
        <table:table-row table:style-name="Tabela2.3">
          <table:table-cell table:style-name="Tabela2.A3" office:value-type="string">
            <text:p text:style-name="P11"><text:span text:style-name="Strong_20_Emphasis"><text:span text:style-name="T5">Saída em Lote (Solicitação)</text:span></text:span></text:p>
          </table:table-cell>
          <table:table-cell table:style-name="Tabela2.B3" office:value-type="string">
            <text:p text:style-name="P11"><text:span text:style-name="Strong_20_Emphasis"><text:span text:style-name="T5">Sim</text:span></text:span></text:p>
          </table:table-cell>
          <table:table-cell table:style-name="Tabela2.C3" office:value-type="string">
            <text:p text:style-name="P11">O mesmo problema da "enchente" de mensagens.</text:p>
          </table:table-cell>
        </table:table-row>
        <table:table-row>
          <table:table-cell table:style-name="Tabela2.A4" office:value-type="string">
            <text:p text:style-name="P11"><text:span text:style-name="Strong_20_Emphasis"><text:span text:style-name="T5">Saída Individual (Confirmação)</text:span></text:span></text:p>
          </table:table-cell>
          <table:table-cell table:style-name="Tabela2.B4" office:value-type="string">
            <text:p text:style-name="P11"><text:span text:style-name="Strong_20_Emphasis"><text:span text:style-name="T5">NÃO</text:span></text:span></text:p>
          </table:table-cell>
          <table:table-cell table:style-name="Tabela2.C4" office:value-type="string">
            <text:p text:style-name="P11"><text:span text:style-name="Strong_20_Emphasis"><text:span text:style-name="T5">O código para notificar a sala simplesmente não foi implementado neste fluxo.</text:span></text:span></text:p>
          </table:table-cell>
        </table:table-row>
      </table:table>
      <text:p text:style-name="P1"><text:span text:style-name="T2">O problema mais crítico e fácil de corrigir é a falta de notificação na </text:span><text:span text:style-name="Strong_20_Emphasis"><text:span text:style-name="T2">Saída Individual</text:span></text:span><text:span text:style-name="T2">. É aqui que devemos focar.</text:span></text:p>
      <text:p text:style-name="Standard"/>
      <text:p text:style-name="Standard"/>
      <text:p text:style-name="Standard"/>
      <text:p text:style-name="P16">TUTOR</text:p>
      <text:h text:style-name="Heading_20_3" text:outline-level="3"><text:span text:style-name="Strong_20_Emphasis"><text:span text:style-name="T1">Verificação Detalhada do Fluxo (Tutor → Backend → Sala)</text:span></text:span></text:h>
      <text:h text:style-name="P4" text:outline-level="4"><text:span text:style-name="Strong_20_Emphasis"><text:span text:style-name="T4">1. Registrar Entrada de Aluno</text:span></text:span></text:h>
      <text:list text:style-name="L7">
        <text:list-item>
          <text:p text:style-name="P17"><text:span text:style-name="Strong_20_Emphasis"><text:span text:style-name="T7">👨‍💻 </text:span></text:span><text:span text:style-name="Strong_20_Emphasis"><text:span text:style-name="T2">Ação no </text:span></text:span><text:span text:style-name="Strong_20_Emphasis"><text:span text:style-name="Source_20_Text"><text:span text:style-name="T3">dashboard-tutor.html</text:span></text:span></text:span><text:span text:style-name="Strong_20_Emphasis"><text:span text:style-name="T2">:</text:span></text:span><text:span text:style-name="T2"> Após analisar o </text:span><text:span text:style-name="Source_20_Text"><text:span text:style-name="T3">dashboard-tutor.html</text:span></text:span><text:span text:style-name="T2">, confirmo que </text:span><text:span text:style-name="Strong_20_Emphasis"><text:span text:style-name="T2">não existe uma função ou botão para o Tutor registrar a entrada de um aluno</text:span></text:span><text:span text:style-name="T2">. As ações disponíveis são </text:span><text:span text:style-name="Source_20_Text"><text:span text:style-name="T3">solicitarSaida</text:span></text:span><text:span text:style-name="T2"> e a leitura de QR Code para confirmação.</text:span></text:p>
        </text:list-item>
        <text:list-item>
          <text:p text:style-name="P17"><text:span text:style-name="Strong_20_Emphasis"><text:span text:style-name="T2">Inferência:</text:span></text:span><text:span text:style-name="T2"> A ação de "Registrar Entrada" por um tutor é provavelmente realizada por um aplicativo móvel separado que consome a API do backend, e não por este painel web.</text:span></text:p>
        </text:list-item>
        <text:list-item>
          <text:p text:style-name="P17"><text:span text:style-name="Strong_20_Emphasis"><text:span text:style-name="T7">⚙️ </text:span></text:span><text:span text:style-name="Strong_20_Emphasis"><text:span text:style-name="T2">No Backend (Quando a ação ocorre):</text:span></text:span><text:span text:style-name="T2"> Conforme nossa análise anterior, se um ator registrar a entrada, o </text:span><text:span text:style-name="Source_20_Text"><text:span text:style-name="T3">PresencaService</text:span></text:span><text:span text:style-name="T2"> envia a mensagem </text:span><text:span text:style-name="Source_20_Text"><text:span text:style-name="T3">ENTRADA_ALUNO</text:span></text:span><text:span text:style-name="T2">.</text:span></text:p>
        </text:list-item>
        <text:list-item>
          <text:p text:style-name="P17"><text:soft-page-break/><text:span text:style-name="Strong_20_Emphasis"><text:span text:style-name="T7">🖥️ </text:span></text:span><text:span text:style-name="Strong_20_Emphasis"><text:span text:style-name="T2">Repercussão na Sala:</text:span></text:span><text:span text:style-name="T2"> O </text:span><text:span text:style-name="Source_20_Text"><text:span text:style-name="T3">dashboard-sala.html</text:span></text:span><text:span text:style-name="T2"> recebe a mensagem e adiciona o card do aluno.</text:span></text:p>
        </text:list-item>
      </text:list>
      <text:p text:style-name="P1"><text:span text:style-name="Strong_20_Emphasis"><text:span text:style-name="T7">✔️ </text:span></text:span><text:span text:style-name="Strong_20_Emphasis"><text:span text:style-name="T2">Veredito:</text:span></text:span><text:span text:style-name="T2"> </text:span><text:span text:style-name="Strong_20_Emphasis"><text:span text:style-name="T2">PARCIALMENTE ATENDIDO.</text:span></text:span><text:span text:style-name="T2"> O backend e a sala estão prontos para a ação, mas este painel específico do Tutor não a executa. A comunicação WebSocket em si está funcional para este evento.</text:span></text:p>
      <text:p text:style-name="Horizontal_20_Line"/>
      <text:h text:style-name="P4" text:outline-level="4"><text:span text:style-name="Strong_20_Emphasis"><text:span text:style-name="T4">2. Solicitar Saída de Aluno</text:span></text:span></text:h>
      <text:p text:style-name="P5">Este é o fluxo mais claro e completo, onde o tutor clica em um botão para iniciar o processo de retirada.</text:p>
      <text:list text:style-name="L8">
        <text:list-item>
          <text:p text:style-name="P18"><text:span text:style-name="Strong_20_Emphasis"><text:span text:style-name="T7">👨‍💻 </text:span></text:span><text:span text:style-name="Strong_20_Emphasis"><text:span text:style-name="T2">Ação no </text:span></text:span><text:span text:style-name="Strong_20_Emphasis"><text:span text:style-name="Source_20_Text"><text:span text:style-name="T3">dashboard-tutor.html</text:span></text:span></text:span><text:span text:style-name="Strong_20_Emphasis"><text:span text:style-name="T2">:</text:span></text:span></text:p>
          <text:list>
            <text:list-item>
              <text:p text:style-name="P19">O tutor clica no botão "Solicitar Saída" de um aluno.</text:p>
            </text:list-item>
            <text:list-item>
              <text:p text:style-name="P18"><text:span text:style-name="T2">A função </text:span><text:span text:style-name="Source_20_Text"><text:span text:style-name="T3">solicitarSaida(alunoId)</text:span></text:span><text:span text:style-name="T2"> é chamada.</text:span></text:p>
            </text:list-item>
            <text:list-item>
              <text:p text:style-name="P18"><text:span text:style-name="T2">Esta função faz uma requisição </text:span><text:span text:style-name="Source_20_Text"><text:span text:style-name="T3">POST</text:span></text:span><text:span text:style-name="T2"> para a API no endpoint: </text:span><text:span text:style-name="Source_20_Text"><text:span text:style-name="T3">/api/chamadas/solicitar-saida</text:span></text:span><text:span text:style-name="T2">. O corpo da requisição envia o </text:span><text:span text:style-name="Source_20_Text"><text:span text:style-name="T3">alunoId</text:span></text:span><text:span text:style-name="T2">, </text:span><text:span text:style-name="Source_20_Text"><text:span text:style-name="T3">latitude</text:span></text:span><text:span text:style-name="T2"> e </text:span><text:span text:style-name="Source_20_Text"><text:span text:style-name="T3">longitude</text:span></text:span><text:span text:style-name="T2">.</text:span></text:p>
            </text:list-item>
          </text:list>
        </text:list-item>
        <text:list-item>
          <text:p text:style-name="P18"><text:span text:style-name="Strong_20_Emphasis"><text:span text:style-name="T7">⚙️ </text:span></text:span><text:span text:style-name="Strong_20_Emphasis"><text:span text:style-name="T2">No Backend (</text:span></text:span><text:span text:style-name="Strong_20_Emphasis"><text:span text:style-name="Source_20_Text"><text:span text:style-name="T3">codigo_completo_0902.txt</text:span></text:span></text:span><text:span text:style-name="Strong_20_Emphasis"><text:span text:style-name="T2">):</text:span></text:span></text:p>
          <text:list>
            <text:list-item>
              <text:p text:style-name="P18"><text:span text:style-name="T2">O </text:span><text:span text:style-name="Source_20_Text"><text:span text:style-name="T3">ChamadaController</text:span></text:span><text:span text:style-name="T2"> recebe a requisição no endpoint </text:span><text:span text:style-name="Source_20_Text"><text:span text:style-name="T3">/solicitar-saida</text:span></text:span><text:span text:style-name="T2">.</text:span></text:p>
            </text:list-item>
            <text:list-item>
              <text:p text:style-name="P18"><text:span text:style-name="T2">Ele chama o </text:span><text:span text:style-name="Source_20_Text"><text:span text:style-name="T3">chamadaAtivaService.criarChamadaSaida(...)</text:span></text:span><text:span text:style-name="T2">.</text:span></text:p>
            </text:list-item>
            <text:list-item>
              <text:p text:style-name="P18"><text:span text:style-name="T2">Este serviço cria o registro </text:span><text:span text:style-name="Source_20_Text"><text:span text:style-name="T3">ChamadaAtiva</text:span></text:span><text:span text:style-name="T2"> no banco de dados com status </text:span><text:span text:style-name="Source_20_Text"><text:span text:style-name="T3">AGUARDANDO_CONFIRMACAO</text:span></text:span><text:span text:style-name="T2">.</text:span></text:p>
            </text:list-item>
            <text:list-item>
              <text:p text:style-name="P18"><text:span text:style-name="T2">Crucialmente, ele então chama </text:span><text:span text:style-name="Source_20_Text"><text:span text:style-name="T3">notificarSalaSaidaPendente(aluno, solicitanteNome, tipo, parentesco)</text:span></text:span><text:span text:style-name="T2">.</text:span></text:p>
            </text:list-item>
            <text:list-item>
              <text:p text:style-name="P18"><text:span text:style-name="T2">Esta função envia a mensagem WebSocket com </text:span><text:span text:style-name="Source_20_Text"><text:span text:style-name="T3">tipo: "SAIDA_PENDENTE"</text:span></text:span><text:span text:style-name="T2"> para o tópico da sala (</text:span><text:span text:style-name="Source_20_Text"><text:span text:style-name="T3">/topic/sala/{salaId}</text:span></text:span><text:span text:style-name="T2">).</text:span></text:p>
            </text:list-item>
          </text:list>
        </text:list-item>
        <text:list-item>
          <text:p text:style-name="P18"><text:span text:style-name="Strong_20_Emphasis"><text:span text:style-name="T7">🖥️ </text:span></text:span><text:span text:style-name="Strong_20_Emphasis"><text:span text:style-name="T2">Repercussão na Sala (</text:span></text:span><text:span text:style-name="Strong_20_Emphasis"><text:span text:style-name="Source_20_Text"><text:span text:style-name="T3">dashboard-sala.html</text:span></text:span></text:span><text:span text:style-name="Strong_20_Emphasis"><text:span text:style-name="T2">):</text:span></text:span></text:p>
          <text:list>
            <text:list-item>
              <text:p text:style-name="P18"><text:span text:style-name="T2">O WebSocket da sala recebe a mensagem </text:span><text:span text:style-name="Source_20_Text"><text:span text:style-name="T3">SAIDA_PENDENTE</text:span></text:span><text:span text:style-name="T2">.</text:span></text:p>
            </text:list-item>
            <text:list-item>
              <text:p text:style-name="P18"><text:span text:style-name="T2">A função </text:span><text:span text:style-name="Source_20_Text"><text:span text:style-name="T3">processarMensagemWebSocket</text:span></text:span><text:span text:style-name="T2"> chama </text:span><text:span text:style-name="Source_20_Text"><text:span text:style-name="T3">processarSaidaPendente()</text:span></text:span><text:span text:style-name="T2">.</text:span></text:p>
            </text:list-item>
            <text:list-item>
              <text:p text:style-name="P19">Esta, por sua vez, atualiza imediatamente o visual do card do aluno para o estado "Pendente" (cor roxa, pulso) e o adiciona à fila de animação e áudio.</text:p>
            </text:list-item>
          </text:list>
        </text:list-item>
      </text:list>
      <text:p text:style-name="P1"><text:span text:style-name="Strong_20_Emphasis"><text:span text:style-name="T7">✔️ </text:span></text:span><text:span text:style-name="Strong_20_Emphasis"><text:span text:style-name="T2">Veredito:</text:span></text:span><text:span text:style-name="T2"> </text:span><text:span text:style-name="Strong_20_Emphasis"><text:span text:style-name="T2">ATENDIDO.</text:span></text:span><text:span text:style-name="T2"> O fluxo é completo, direto e utiliza corretamente o WebSocket para notificar a sala em tempo real.</text:span></text:p>
      <text:p text:style-name="Horizontal_20_Line"/>
      <text:h text:style-name="P4" text:outline-level="4"><text:soft-page-break/><text:span text:style-name="Strong_20_Emphasis"><text:span text:style-name="T4">3. Confirmar Saída de Aluno</text:span></text:span></text:h>
      <text:p text:style-name="P1"><text:span text:style-name="T2">Este fluxo no </text:span><text:span text:style-name="Source_20_Text"><text:span text:style-name="T3">dashboard-tutor.html</text:span></text:span><text:span text:style-name="T2"> é projetado para acontecer via leitura de QR Code, simulando a chegada do tutor na escola.</text:span></text:p>
      <text:list text:style-name="L9">
        <text:list-item>
          <text:p text:style-name="P20"><text:span text:style-name="Strong_20_Emphasis"><text:span text:style-name="T7">👨‍💻 </text:span></text:span><text:span text:style-name="Strong_20_Emphasis"><text:span text:style-name="T2">Ação no </text:span></text:span><text:span text:style-name="Strong_20_Emphasis"><text:span text:style-name="Source_20_Text"><text:span text:style-name="T3">dashboard-tutor.html</text:span></text:span></text:span><text:span text:style-name="Strong_20_Emphasis"><text:span text:style-name="T2">:</text:span></text:span></text:p>
          <text:list>
            <text:list-item>
              <text:p text:style-name="P20"><text:span text:style-name="T2">O tutor clica no ícone de QR Code, que ativa a câmera através da função </text:span><text:span text:style-name="Source_20_Text"><text:span text:style-name="T3">abrirModalConfirmacao()</text:span></text:span><text:span text:style-name="T2">.</text:span></text:p>
            </text:list-item>
            <text:list-item>
              <text:p text:style-name="P20"><text:span text:style-name="T2">A biblioteca (</text:span><text:span text:style-name="Source_20_Text"><text:span text:style-name="T3">Html5QrcodeScanner</text:span></text:span><text:span text:style-name="T2">) escaneia o código.</text:span></text:p>
            </text:list-item>
            <text:list-item>
              <text:p text:style-name="P20"><text:span text:style-name="T2">Ao escanear com sucesso (</text:span><text:span text:style-name="Source_20_Text"><text:span text:style-name="T3">onScanSuccess</text:span></text:span><text:span text:style-name="T2">), a função extrai o </text:span><text:span text:style-name="Source_20_Text"><text:span text:style-name="T3">token</text:span></text:span><text:span text:style-name="T2"> do QR Code.</text:span></text:p>
            </text:list-item>
            <text:list-item>
              <text:p text:style-name="P20"><text:span text:style-name="T2">Ela então envia uma requisição </text:span><text:span text:style-name="Source_20_Text"><text:span text:style-name="T3">POST</text:span></text:span><text:span text:style-name="T2"> para o endpoint: </text:span><text:span text:style-name="Source_20_Text"><text:span text:style-name="T3">/api/chamadas/confirmar-saida-token</text:span></text:span><text:span text:style-name="T2">. O corpo da requisição envia o </text:span><text:span text:style-name="Source_20_Text"><text:span text:style-name="T3">alunoId</text:span></text:span><text:span text:style-name="T2"> e o </text:span><text:span text:style-name="Source_20_Text"><text:span text:style-name="T3">token</text:span></text:span><text:span text:style-name="T2">.</text:span></text:p>
            </text:list-item>
          </text:list>
        </text:list-item>
        <text:list-item>
          <text:p text:style-name="P20"><text:span text:style-name="Strong_20_Emphasis"><text:span text:style-name="T7">⚙️ </text:span></text:span><text:span text:style-name="Strong_20_Emphasis"><text:span text:style-name="T2">No Backend (</text:span></text:span><text:span text:style-name="Strong_20_Emphasis"><text:span text:style-name="Source_20_Text"><text:span text:style-name="T3">codigo_completo_0902.txt</text:span></text:span></text:span><text:span text:style-name="Strong_20_Emphasis"><text:span text:style-name="T2">):</text:span></text:span></text:p>
          <text:list>
            <text:list-item>
              <text:p text:style-name="P20"><text:span text:style-name="T2">O </text:span><text:span text:style-name="Source_20_Text"><text:span text:style-name="T3">ChamadaController</text:span></text:span><text:span text:style-name="T2"> recebe a requisição em </text:span><text:span text:style-name="Source_20_Text"><text:span text:style-name="T3">/confirmar-saida-token</text:span></text:span><text:span text:style-name="T2">.</text:span></text:p>
            </text:list-item>
            <text:list-item>
              <text:p text:style-name="P20"><text:span text:style-name="T2">Ele chama o </text:span><text:span text:style-name="Source_20_Text"><text:span text:style-name="T3">chamadaAtivaService.confirmarSaidaPorToken(...)</text:span></text:span><text:span text:style-name="T2">.</text:span></text:p>
            </text:list-item>
            <text:list-item>
              <text:p text:style-name="P20"><text:span text:style-name="T2">Este serviço valida o token, o aluno e o status da chamada. Se tudo estiver correto, ele atualiza a </text:span><text:span text:style-name="Source_20_Text"><text:span text:style-name="T3">ChamadaAtiva</text:span></text:span><text:span text:style-name="T2"> para </text:span><text:span text:style-name="Source_20_Text"><text:span text:style-name="T3">CONFIRMADA</text:span></text:span><text:span text:style-name="T2"> e o status do aluno para </text:span><text:span text:style-name="Source_20_Text"><text:span text:style-name="T3">AUSENTE</text:span></text:span><text:span text:style-name="T2">.</text:span></text:p>
            </text:list-item>
            <text:list-item>
              <text:p text:style-name="P20"><text:span text:style-name="T2">Em seguida, ele chama </text:span><text:span text:style-name="Source_20_Text"><text:span text:style-name="T3">salaWebSocketService.notificarSaidaConfirmada(aluno)</text:span></text:span><text:span text:style-name="T2">.</text:span></text:p>
            </text:list-item>
            <text:list-item>
              <text:p text:style-name="P20"><text:span text:style-name="T2">Esta função envia a mensagem WebSocket com </text:span><text:span text:style-name="Source_20_Text"><text:span text:style-name="T3">tipo: "SAIDA_CONFIRMADA"</text:span></text:span><text:span text:style-name="T2"> para o tópico da sala (</text:span><text:span text:style-name="Source_20_Text"><text:span text:style-name="T3">/topic/sala/{salaId}</text:span></text:span><text:span text:style-name="T2">).</text:span></text:p>
            </text:list-item>
          </text:list>
        </text:list-item>
        <text:list-item>
          <text:p text:style-name="P20"><text:span text:style-name="Strong_20_Emphasis"><text:span text:style-name="T7">🖥️ </text:span></text:span><text:span text:style-name="Strong_20_Emphasis"><text:span text:style-name="T2">Repercussão na Sala (</text:span></text:span><text:span text:style-name="Strong_20_Emphasis"><text:span text:style-name="Source_20_Text"><text:span text:style-name="T3">dashboard-sala.html</text:span></text:span></text:span><text:span text:style-name="Strong_20_Emphasis"><text:span text:style-name="T2">):</text:span></text:span></text:p>
          <text:list>
            <text:list-item>
              <text:p text:style-name="P20"><text:span text:style-name="T2">O WebSocket da sala recebe a mensagem </text:span><text:span text:style-name="Source_20_Text"><text:span text:style-name="T3">SAIDA_CONFIRMADA</text:span></text:span><text:span text:style-name="T2">.</text:span></text:p>
            </text:list-item>
            <text:list-item>
              <text:p text:style-name="P20"><text:span text:style-name="Source_20_Text"><text:span text:style-name="T3">processarMensagemWebSocket</text:span></text:span><text:span text:style-name="T2"> chama </text:span><text:span text:style-name="Source_20_Text"><text:span text:style-name="T3">processarSaidaConfirmada()</text:span></text:span><text:span text:style-name="T2">.</text:span></text:p>
            </text:list-item>
            <text:list-item>
              <text:p text:style-name="P21">Esta função remove o aluno da lista de dados e redesenha a grade, fazendo o card do aluno desaparecer da tela.</text:p>
            </text:list-item>
          </text:list>
        </text:list-item>
      </text:list>
      <text:p text:style-name="P1"><text:span text:style-name="Strong_20_Emphasis"><text:span text:style-name="T7">✔️ </text:span></text:span><text:span text:style-name="Strong_20_Emphasis"><text:span text:style-name="T2">Veredito:</text:span></text:span><text:span text:style-name="T2"> </text:span><text:span text:style-name="Strong_20_Emphasis"><text:span text:style-name="T2">ATENDIDO.</text:span></text:span><text:span text:style-name="T2"> O fluxo de confirmação por token também está perfeitamente implementado, garantindo que a sala seja notificada via WebSocket quando o aluno é efetivamente retirado.</text:span></text:p>
      <text:p text:style-name="Horizontal_20_Line"/>
      <text:h text:style-name="P3" text:outline-level="3"><text:span text:style-name="Strong_20_Emphasis"><text:span text:style-name="T1">Conclusão Final e Precisa</text:span></text:span></text:h>
      <text:p text:style-name="P1"><text:span text:style-name="T2">A comunicação via WebSocket entre o Tutor (conforme o </text:span><text:span text:style-name="Source_20_Text"><text:span text:style-name="T3">dashboard-tutor.html</text:span></text:span><text:span text:style-name="T2">) e a Sala (</text:span><text:span text:style-name="Source_20_Text"><text:span text:style-name="T3">dashboard-sala.html</text:span></text:span><text:span text:style-name="T2">) está </text:span><text:span text:style-name="Strong_20_Emphasis"><text:span text:style-name="T2">corretamente implementada para os fluxos de Solicitação e Confirmação de Saída</text:span></text:span><text:span text:style-name="T2">. O backend atua como o intermediário perfeito, recebendo as requisições </text:span><text:soft-page-break/><text:span text:style-name="T2">HTTP do tutor e traduzindo-as em mensagens WebSocket em tempo real para a sala. A ação de entrada, embora funcional no backend e na sala, não é iniciada por este painel web do tutor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Inter" svg:font-family="Inter, apple-system, BlinkMacSystemFont, 'San Francisco', 'Segoe UI', Roboto, 'Helvetica Neue', sans-serif"/>
    <style:font-face style:name="Lato" svg:font-family="Lato"/>
    <style:font-face style:name="Lato Black" svg:font-family="'Lato Bl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ato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ato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ato Black" fo:font-family="'Lato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ato" fo:font-family="Lato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ato" fo:font-family="Lato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23:43:10.605705800</meta:creation-date>
    <dc:date>2026-02-10T15:14:04.377056800</dc:date>
    <meta:editing-duration>PT15H30M52S</meta:editing-duration>
    <meta:editing-cycles>5</meta:editing-cycles>
    <meta:generator>LibreOffice/25.8.3.2$Windows_X86_64 LibreOffice_project/8ca8d55c161d602844f5428fa4b58097424e324e</meta:generator>
    <meta:document-statistic meta:table-count="2" meta:image-count="0" meta:object-count="0" meta:page-count="7" meta:paragraph-count="132" meta:word-count="1574" meta:character-count="10459" meta:non-whitespace-character-count="9081"/>
  </office:meta>
</office:document-meta>
</file>