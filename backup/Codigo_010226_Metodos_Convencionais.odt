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ato" svg:font-family="Lato"/>
    <style:font-face style:name="Lato Black" svg:font-family="'Lato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6a9955" loext:opacity="100%" style:font-name="Consolas" fo:font-size="10.5pt" fo:font-weight="normal" officeooo:paragraph-rsid="0018a204" fo:background-color="transparen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18a204"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transparent"/>
    </style:style>
    <style:style style:name="P5" style:family="paragraph" style:parent-style-name="Standard">
      <style:paragraph-properties style:line-height-at-least="0.503cm"/>
      <style:text-properties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transparent"/>
    </style:style>
    <style:style style:name="T1" style:family="text">
      <style:text-properties fo:color="#6a9955" loext:opacity="100%" style:font-name="Consolas" fo:font-size="10.5pt" fo:font-weight="normal"/>
    </style:style>
    <style:style style:name="T2" style:family="text">
      <style:text-properties fo:color="#6a9955" loext:opacity="100%" style:font-name="Consolas" fo:font-size="10.5pt" fo:font-weight="normal" officeooo:rsid="0018a204"/>
    </style:style>
    <style:style style:name="T3" style:family="text">
      <style:text-properties fo:color="#6a9955" loext:opacity="100%"/>
    </style:style>
    <style:style style:name="T4" style:family="text">
      <style:text-properties fo:color="#808080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ccccc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-- ================================================== --&gt;</text:p>
      <text:p text:style-name="P2">  <text:span text:style-name="T1">&lt;!-- ==== </text:span><text:span text:style-name="T2">Os Metodos Convencionais</text:span><text:span text:style-name="T1"> ==== --&gt;</text:span></text:p>
      <text:p text:style-name="P2">  <text:span text:style-name="T3">&lt;!-- ================================================== --&gt;</text:span></text:p>
      <text:p text:style-name="P3">&lt;!-- Problem Section --&gt;</text:p>
      <text:p text:style-name="P4">  <text:span text:style-name="T4">&lt;</text:span><text:span text:style-name="T5">section</text:span><text:span text:style-name="T6"> </text:span><text:span text:style-name="T7">id</text:span><text:span text:style-name="T6">=</text:span><text:span text:style-name="T8">"problem"</text:span><text:span text:style-name="T6"> </text:span><text:span text:style-name="T7">class</text:span><text:span text:style-name="T6">=</text:span><text:span text:style-name="T8">"px-4 sm:px-6 lg:px-8 py-20 sm:py-32 bg-white reveal"</text:span><text:span text:style-name="T4">&gt;</text:span></text:p>
      <text:p text:style-name="P4">    <text:span text:style-name="T4">&lt;</text:span><text:span text:style-name="T5">div</text:span><text:span text:style-name="T6"> </text:span><text:span text:style-name="T7">class</text:span><text:span text:style-name="T6">=</text:span><text:span text:style-name="T8">"max-w-7xl mx-auto"</text:span><text:span text:style-name="T4">&gt;</text:span></text:p>
      <text:p text:style-name="P4">      <text:span text:style-name="T4">&lt;</text:span><text:span text:style-name="T5">div</text:span><text:span text:style-name="T6"> </text:span><text:span text:style-name="T7">class</text:span><text:span text:style-name="T6">=</text:span><text:span text:style-name="T8">"text-center mb-16"</text:span><text:span text:style-name="T4">&gt;</text:span></text:p>
      <text:p text:style-name="P4">        <text:span text:style-name="T4">&lt;</text:span><text:span text:style-name="T5">h2</text:span><text:span text:style-name="T6"> </text:span><text:span text:style-name="T7">class</text:span><text:span text:style-name="T6">=</text:span><text:span text:style-name="T8">"text-4xl sm:text-5xl font-bold text-gray-900 mb-4"</text:span><text:span text:style-name="T4">&gt;</text:span></text:p>
      <text:p text:style-name="P4">          <text:span text:style-name="T6">Os Métodos Convencionais</text:span></text:p>
      <text:p text:style-name="P4">        <text:span text:style-name="T4">&lt;/</text:span><text:span text:style-name="T5">h2</text:span><text:span text:style-name="T4">&gt;</text:span></text:p>
      <text:p text:style-name="P4">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xl text-gray-600 max-w-3xl mx-auto"</text:span><text:span text:style-name="T4">&gt;</text:span></text:p>
      <text:p text:style-name="P4">          <text:span text:style-name="T6">A saída escolar envolve comunicação entre portaria, equipe pedagógica e responsáveis.</text:span></text:p>
      <text:p text:style-name="P4">          <text:span text:style-name="T6">Diferentes formas de organização são utilizadas para viabilizar esse processo, cada</text:span></text:p>
      <text:p text:style-name="P4">          <text:span text:style-name="T6">uma com características operacionais próprias.</text:span></text:p>
      <text:p text:style-name="P4">        <text:span text:style-name="T4">&lt;/</text:span><text:span text:style-name="T5">p</text:span><text:span text:style-name="T4">&gt;</text:span></text:p>
      <text:p text:style-name="P4">      <text:span text:style-name="T4">&lt;/</text:span><text:span text:style-name="T5">div</text:span><text:span text:style-name="T4">&gt;</text:span></text:p>
      <text:p text:style-name="P5"/>
      <text:p text:style-name="P4">      <text:span text:style-name="T4">&lt;</text:span><text:span text:style-name="T5">div</text:span><text:span text:style-name="T6"> </text:span><text:span text:style-name="T7">class</text:span><text:span text:style-name="T6">=</text:span><text:span text:style-name="T8">"grid md:grid-cols-2 lg:grid-cols-4 gap-6"</text:span><text:span text:style-name="T4">&gt;</text:span></text:p>
      <text:p text:style-name="P4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bg-red-50 rounded-xl p-8 border border-red-100 reveal"</text:span><text:span text:style-name="T4">&gt;</text:span></text:p>
      <text:p text:style-name="P4">          <text:span text:style-name="T4">&lt;</text:span><text:span text:style-name="T5">div</text:span><text:span text:style-name="T6"> </text:span><text:span text:style-name="T7">class</text:span><text:span text:style-name="T6">=</text:span><text:span text:style-name="T8">"w-12 h-12 bg-red-100 rounded-lg flex items-center justify-center mb-4"</text:span><text:span text:style-name="T4">&gt;</text:span></text:p>
      <text:p text:style-name="P4">            <text:span text:style-name="T4">&lt;</text:span><text:span text:style-name="T5">svg</text:span><text:span text:style-name="T6"> </text:span><text:span text:style-name="T7">class</text:span><text:span text:style-name="T6">=</text:span><text:span text:style-name="T8">"w-6 h-6 text-red-600"</text:span><text:span text:style-name="T6"> </text:span><text:span text:style-name="T7">fill</text:span><text:span text:style-name="T6">=</text:span><text:span text:style-name="T8">"none"</text:span><text:span text:style-name="T6"> </text:span><text:span text:style-name="T7">stroke</text:span><text:span text:style-name="T6">=</text:span><text:span text:style-name="T8">"currentColor"</text:span><text:span text:style-name="T6"> </text:span><text:span text:style-name="T7">viewBox</text:span><text:span text:style-name="T6">=</text:span><text:span text:style-name="T8">"0 0 24 24"</text:span><text:span text:style-name="T4">&gt;</text:span></text:p>
      <text:p text:style-name="P4">              <text:span text:style-name="T4">&lt;</text:span><text:span text:style-name="T5">path</text:span><text:span text:style-name="T6"> </text:span><text:span text:style-name="T7">stroke-linecap</text:span><text:span text:style-name="T6">=</text:span><text:span text:style-name="T8">"round"</text:span><text:span text:style-name="T6"> </text:span><text:span text:style-name="T7">stroke-linejoin</text:span><text:span text:style-name="T6">=</text:span><text:span text:style-name="T8">"round"</text:span><text:span text:style-name="T6"> </text:span><text:span text:style-name="T7">stroke-width</text:span><text:span text:style-name="T6">=</text:span><text:span text:style-name="T8">"2"</text:span></text:p>
      <text:p text:style-name="P4">                <text:span text:style-name="T7">d</text:span><text:span text:style-name="T6">=</text:span><text:span text:style-name="T8">"M11 5a3 3 0 116 0v1H6v4a1 1 0 001 1h10a1 1 0 001-1v-4h1V5a3 3 0 11-6 0v1m-1 0a1 1 0 001-1V5a1 1 0 10-2 0v1a1 1 0 001 1m4 10h.01M7 16h.01M4 12h.01M19 12h.01"</text:span><text:span text:style-name="T6"> </text:span><text:span text:style-name="T4">/&gt;</text:span></text:p>
      <text:p text:style-name="P4">            <text:span text:style-name="T4">&lt;/</text:span><text:span text:style-name="T5">svg</text:span><text:span text:style-name="T4">&gt;</text:span></text:p>
      <text:p text:style-name="P4">          <text:span text:style-name="T4">&lt;/</text:span><text:span text:style-name="T5">div</text:span><text:span text:style-name="T4">&gt;</text:span></text:p>
      <text:p text:style-name="P4">          <text:span text:style-name="T4">&lt;</text:span><text:span text:style-name="T5">h3</text:span><text:span text:style-name="T6"> </text:span><text:span text:style-name="T7">class</text:span><text:span text:style-name="T6">=</text:span><text:span text:style-name="T8">"text-lg font-bold text-gray-900 mb-3"</text:span><text:span text:style-name="T4">&gt;</text:span></text:p>
      <text:p text:style-name="P4">            <text:span text:style-name="T6">Alto-Falantes</text:span></text:p>
      <text:p text:style-name="P4">          <text:span text:style-name="T4">&lt;/</text:span><text:span text:style-name="T5">h3</text:span><text:span text:style-name="T4">&gt;</text:span></text:p>
      <text:p text:style-name="P4">  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gray-600"</text:span><text:span text:style-name="T4">&gt;</text:span></text:p>
      <text:p text:style-name="P4">            <text:span text:style-name="T6">Quando realizados por alto-falante, os chamados repercutem por todo o</text:span></text:p>
      <text:p text:style-name="P4">            <text:span text:style-name="T6">ambiente escolar, alcançando pessoas que não participam diretamente daquele</text:span></text:p>
      <text:p text:style-name="P4">            <text:span text:style-name="T6">vínculo, o que pode impactar a concentração, a privacidade e a exposição</text:span></text:p>
      <text:p text:style-name="P4">            <text:span text:style-name="T6">pública do aluno.</text:span></text:p>
      <text:p text:style-name="P4">          <text:span text:style-name="T4">&lt;/</text:span><text:span text:style-name="T5">p</text:span><text:span text:style-name="T4">&gt;</text:span></text:p>
      <text:p text:style-name="P4">        <text:span text:style-name="T4">&lt;/</text:span><text:span text:style-name="T5">div</text:span><text:span text:style-name="T4">&gt;</text:span></text:p>
      <text:p text:style-name="P5"/>
      <text:p text:style-name="P4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bg-orange-50 rounded-xl p-8 border border-orange-100 reveal"</text:span><text:span text:style-name="T4">&gt;</text:span></text:p>
      <text:p text:style-name="P4">          <text:span text:style-name="T4">&lt;</text:span><text:span text:style-name="T5">div</text:span><text:span text:style-name="T6"> </text:span><text:span text:style-name="T7">class</text:span><text:span text:style-name="T6">=</text:span><text:span text:style-name="T8">"w-12 h-12 bg-orange-100 rounded-lg flex items-center justify-center mb-4"</text:span><text:span text:style-name="T4">&gt;</text:span></text:p>
      <text:p text:style-name="P4">            <text:span text:style-name="T4">&lt;</text:span><text:span text:style-name="T5">svg</text:span><text:span text:style-name="T6"> </text:span><text:span text:style-name="T7">class</text:span><text:span text:style-name="T6">=</text:span><text:span text:style-name="T8">"w-6 h-6 text-orange-600"</text:span><text:span text:style-name="T6"> </text:span><text:span text:style-name="T7">fill</text:span><text:span text:style-name="T6">=</text:span><text:span text:style-name="T8">"none"</text:span><text:span text:style-name="T6"> </text:span><text:span text:style-name="T7">stroke</text:span><text:span text:style-name="T6">=</text:span><text:span text:style-name="T8">"currentColor"</text:span><text:span text:style-name="T6"> </text:span><text:span text:style-name="T7">viewBox</text:span><text:span text:style-name="T6">=</text:span><text:span text:style-name="T8">"0 0 24 24"</text:span><text:span text:style-name="T4">&gt;</text:span></text:p>
      <text:p text:style-name="P4">              <text:span text:style-name="T4">&lt;</text:span><text:span text:style-name="T5">path</text:span><text:span text:style-name="T6"> </text:span><text:span text:style-name="T7">stroke-linecap</text:span><text:span text:style-name="T6">=</text:span><text:span text:style-name="T8">"round"</text:span><text:span text:style-name="T6"> </text:span><text:span text:style-name="T7">stroke-linejoin</text:span><text:span text:style-name="T6">=</text:span><text:span text:style-name="T8">"round"</text:span><text:span text:style-name="T6"> </text:span><text:span text:style-name="T7">stroke-width</text:span><text:span text:style-name="T6">=</text:span><text:span text:style-name="T8">"2"</text:span></text:p>
      <text:p text:style-name="P4">                <text:span text:style-name="T7">d</text:span><text:span text:style-name="T6">=</text:span><text:span text:style-name="T8">"M12 9v2m0 4v2m0 4v2m0-16a9 9 0 110 18 9 9 0 010-18z"</text:span><text:span text:style-name="T6"> </text:span><text:span text:style-name="T4">/&gt;</text:span></text:p>
      <text:p text:style-name="P4">            <text:span text:style-name="T4">&lt;/</text:span><text:span text:style-name="T5">svg</text:span><text:span text:style-name="T4">&gt;</text:span></text:p>
      <text:p text:style-name="P4"><text:soft-page-break/>          <text:span text:style-name="T4">&lt;/</text:span><text:span text:style-name="T5">div</text:span><text:span text:style-name="T4">&gt;</text:span></text:p>
      <text:p text:style-name="P4">          <text:span text:style-name="T4">&lt;</text:span><text:span text:style-name="T5">h3</text:span><text:span text:style-name="T6"> </text:span><text:span text:style-name="T7">class</text:span><text:span text:style-name="T6">=</text:span><text:span text:style-name="T8">"text-lg font-bold text-gray-900 mb-3"</text:span><text:span text:style-name="T4">&gt;</text:span></text:p>
      <text:p text:style-name="P4">            <text:span text:style-name="T6">Walkie-Talkie</text:span></text:p>
      <text:p text:style-name="P4">          <text:span text:style-name="T4">&lt;/</text:span><text:span text:style-name="T5">h3</text:span><text:span text:style-name="T4">&gt;</text:span></text:p>
      <text:p text:style-name="P4">  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gray-600"</text:span><text:span text:style-name="T4">&gt;</text:span></text:p>
      <text:p text:style-name="P4">            <text:span text:style-name="T6">Quando a comunicação ocorre por este meio, a organização da saída depende de múltiplas</text:span></text:p>
      <text:p text:style-name="P4">            <text:span text:style-name="T6">interações entre portaria e salas de aula, envolvendo toda a equipe em cada</text:span></text:p>
      <text:p text:style-name="P4">            <text:span text:style-name="T6">chamada e exigindo constantes interrupções da prática pedagógica.</text:span></text:p>
      <text:p text:style-name="P4">          <text:span text:style-name="T4">&lt;/</text:span><text:span text:style-name="T5">p</text:span><text:span text:style-name="T4">&gt;</text:span></text:p>
      <text:p text:style-name="P4">        <text:span text:style-name="T4">&lt;/</text:span><text:span text:style-name="T5">div</text:span><text:span text:style-name="T4">&gt;</text:span></text:p>
      <text:p text:style-name="P5"/>
      <text:p text:style-name="P4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bg-yellow-50 rounded-xl p-8 border border-yellow-100 reveal"</text:span><text:span text:style-name="T4">&gt;</text:span></text:p>
      <text:p text:style-name="P4">          <text:span text:style-name="T4">&lt;</text:span><text:span text:style-name="T5">div</text:span><text:span text:style-name="T6"> </text:span><text:span text:style-name="T7">class</text:span><text:span text:style-name="T6">=</text:span><text:span text:style-name="T8">"w-12 h-12 bg-yellow-100 rounded-lg flex items-center justify-center mb-4"</text:span><text:span text:style-name="T4">&gt;</text:span></text:p>
      <text:p text:style-name="P4">            <text:span text:style-name="T4">&lt;</text:span><text:span text:style-name="T5">svg</text:span><text:span text:style-name="T6"> </text:span><text:span text:style-name="T7">class</text:span><text:span text:style-name="T6">=</text:span><text:span text:style-name="T8">"w-6 h-6 text-yellow-600"</text:span><text:span text:style-name="T6"> </text:span><text:span text:style-name="T7">fill</text:span><text:span text:style-name="T6">=</text:span><text:span text:style-name="T8">"none"</text:span><text:span text:style-name="T6"> </text:span><text:span text:style-name="T7">stroke</text:span><text:span text:style-name="T6">=</text:span><text:span text:style-name="T8">"currentColor"</text:span><text:span text:style-name="T6"> </text:span><text:span text:style-name="T7">viewBox</text:span><text:span text:style-name="T6">=</text:span><text:span text:style-name="T8">"0 0 24 24"</text:span><text:span text:style-name="T4">&gt;</text:span></text:p>
      <text:p text:style-name="P4">              <text:span text:style-name="T4">&lt;</text:span><text:span text:style-name="T5">path</text:span><text:span text:style-name="T6"> </text:span><text:span text:style-name="T7">stroke-linecap</text:span><text:span text:style-name="T6">=</text:span><text:span text:style-name="T8">"round"</text:span><text:span text:style-name="T6"> </text:span><text:span text:style-name="T7">stroke-linejoin</text:span><text:span text:style-name="T6">=</text:span><text:span text:style-name="T8">"round"</text:span><text:span text:style-name="T6"> </text:span><text:span text:style-name="T7">stroke-width</text:span><text:span text:style-name="T6">=</text:span><text:span text:style-name="T8">"2"</text:span></text:p>
      <text:p text:style-name="P4">                <text:span text:style-name="T7">d</text:span><text:span text:style-name="T6">=</text:span><text:span text:style-name="T8">"M12 15v2m-6 4h12a2 2 0 002-2v-6a2 2 0 00-2-2H6a2 2 0 00-2 2v6a2 2 0 002 2zm10-10V7a4 4 0 00-8 0v4h8z"</text:span><text:span text:style-name="T6"> </text:span><text:span text:style-name="T4">/&gt;</text:span></text:p>
      <text:p text:style-name="P4">            <text:span text:style-name="T4">&lt;/</text:span><text:span text:style-name="T5">svg</text:span><text:span text:style-name="T4">&gt;</text:span></text:p>
      <text:p text:style-name="P4">          <text:span text:style-name="T4">&lt;/</text:span><text:span text:style-name="T5">div</text:span><text:span text:style-name="T4">&gt;</text:span></text:p>
      <text:p text:style-name="P4">          <text:span text:style-name="T4">&lt;</text:span><text:span text:style-name="T5">h3</text:span><text:span text:style-name="T6"> </text:span><text:span text:style-name="T7">class</text:span><text:span text:style-name="T6">=</text:span><text:span text:style-name="T8">"text-lg font-bold text-gray-900 mb-3"</text:span><text:span text:style-name="T4">&gt;</text:span></text:p>
      <text:p text:style-name="P4">            <text:span text:style-name="T6">Mensagens por Zap</text:span></text:p>
      <text:p text:style-name="P4">          <text:span text:style-name="T4">&lt;/</text:span><text:span text:style-name="T5">h3</text:span><text:span text:style-name="T4">&gt;</text:span></text:p>
      <text:p text:style-name="P4">  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gray-600"</text:span><text:span text:style-name="T4">&gt;</text:span></text:p>
      <text:p text:style-name="P4">            <text:span text:style-name="T6">Quando as solicitações são enviadas diretamente ao smartphone da professora, a comunicação</text:span></text:p>
      <text:p text:style-name="P4">            <text:span text:style-name="T6">passa a disputar atenção com a condução da sala, ampliando a carga cognitiva e reduzindo a</text:span></text:p>
      <text:p text:style-name="P4">            <text:span text:style-name="T6">atenção plena ao grupo de alunos.</text:span></text:p>
      <text:p text:style-name="P4">          <text:span text:style-name="T4">&lt;/</text:span><text:span text:style-name="T5">p</text:span><text:span text:style-name="T4">&gt;</text:span></text:p>
      <text:p text:style-name="P4">        <text:span text:style-name="T4">&lt;/</text:span><text:span text:style-name="T5">div</text:span><text:span text:style-name="T4">&gt;</text:span></text:p>
      <text:p text:style-name="P5"/>
      <text:p text:style-name="P4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bg-amber-50 rounded-xl p-8 border border-amber-100 reveal"</text:span><text:span text:style-name="T4">&gt;</text:span></text:p>
      <text:p text:style-name="P4">          <text:span text:style-name="T4">&lt;</text:span><text:span text:style-name="T5">div</text:span><text:span text:style-name="T6"> </text:span><text:span text:style-name="T7">class</text:span><text:span text:style-name="T6">=</text:span><text:span text:style-name="T8">"w-12 h-12 bg-amber-100 rounded-lg flex items-center justify-center mb-4"</text:span><text:span text:style-name="T4">&gt;</text:span></text:p>
      <text:p text:style-name="P4">            <text:span text:style-name="T4">&lt;</text:span><text:span text:style-name="T5">svg</text:span><text:span text:style-name="T6"> </text:span><text:span text:style-name="T7">class</text:span><text:span text:style-name="T6">=</text:span><text:span text:style-name="T8">"w-6 h-6 text-amber-600"</text:span><text:span text:style-name="T6"> </text:span><text:span text:style-name="T7">fill</text:span><text:span text:style-name="T6">=</text:span><text:span text:style-name="T8">"none"</text:span><text:span text:style-name="T6"> </text:span><text:span text:style-name="T7">stroke</text:span><text:span text:style-name="T6">=</text:span><text:span text:style-name="T8">"currentColor"</text:span><text:span text:style-name="T6"> </text:span><text:span text:style-name="T7">viewBox</text:span><text:span text:style-name="T6">=</text:span><text:span text:style-name="T8">"0 0 24 24"</text:span><text:span text:style-name="T4">&gt;</text:span></text:p>
      <text:p text:style-name="P4">              <text:span text:style-name="T4">&lt;</text:span><text:span text:style-name="T5">path</text:span><text:span text:style-name="T6"> </text:span><text:span text:style-name="T7">stroke-linecap</text:span><text:span text:style-name="T6">=</text:span><text:span text:style-name="T8">"round"</text:span><text:span text:style-name="T6"> </text:span><text:span text:style-name="T7">stroke-linejoin</text:span><text:span text:style-name="T6">=</text:span><text:span text:style-name="T8">"round"</text:span><text:span text:style-name="T6"> </text:span><text:span text:style-name="T7">stroke-width</text:span><text:span text:style-name="T6">=</text:span><text:span text:style-name="T8">"2"</text:span></text:p>
      <text:p text:style-name="P4">                <text:span text:style-name="T7">d</text:span><text:span text:style-name="T6">=</text:span><text:span text:style-name="T8">"M12 4.354a4 4 0 110 5.292M15 21H3v-2a6 6 0 0112 0v2zm0 0h6v-2a6 6 0 00-9-5.656"</text:span><text:span text:style-name="T6"> </text:span><text:span text:style-name="T4">/&gt;</text:span></text:p>
      <text:p text:style-name="P4">            <text:span text:style-name="T4">&lt;/</text:span><text:span text:style-name="T5">svg</text:span><text:span text:style-name="T4">&gt;</text:span></text:p>
      <text:p text:style-name="P4">          <text:span text:style-name="T4">&lt;/</text:span><text:span text:style-name="T5">div</text:span><text:span text:style-name="T4">&gt;</text:span></text:p>
      <text:p text:style-name="P4">          <text:span text:style-name="T4">&lt;</text:span><text:span text:style-name="T5">h3</text:span><text:span text:style-name="T6"> </text:span><text:span text:style-name="T7">class</text:span><text:span text:style-name="T6">=</text:span><text:span text:style-name="T8">"text-lg font-bold text-gray-900 mb-3"</text:span><text:span text:style-name="T4">&gt;</text:span></text:p>
      <text:p text:style-name="P4">            <text:span text:style-name="T6">Espera no Pátio</text:span></text:p>
      <text:p text:style-name="P4">          <text:span text:style-name="T4">&lt;/</text:span><text:span text:style-name="T5">h3</text:span><text:span text:style-name="T4">&gt;</text:span></text:p>
      <text:p text:style-name="P4">  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gray-600"</text:span><text:span text:style-name="T4">&gt;</text:span></text:p>
      <text:p text:style-name="P4">            <text:span text:style-name="T6">Quando a saída ocorre desta forma, o processo passa a depender da tentativa de comunicação visual</text:span></text:p>
      <text:p text:style-name="P4"><text:soft-page-break/>            <text:span text:style-name="T6">e verbal individual dos responsáveis e da atenção das crianças, exigindo autorregulação constante</text:span></text:p>
      <text:p text:style-name="P4">            <text:span text:style-name="T6">em um ambiente naturalmente estimulante e compartilhado.</text:span></text:p>
      <text:p text:style-name="P4">          <text:span text:style-name="T4">&lt;/</text:span><text:span text:style-name="T5">p</text:span><text:span text:style-name="T4">&gt;</text:span></text:p>
      <text:p text:style-name="P4">        <text:span text:style-name="T4">&lt;/</text:span><text:span text:style-name="T5">div</text:span><text:span text:style-name="T4">&gt;</text:span></text:p>
      <text:p text:style-name="P4">      <text:span text:style-name="T4">&lt;/</text:span><text:span text:style-name="T5">div</text:span><text:span text:style-name="T4">&gt;</text:span></text:p>
      <text:p text:style-name="P5"/>
      <text:p text:style-name="P4">      <text:span text:style-name="T4">&lt;</text:span><text:span text:style-name="T5">div</text:span><text:span text:style-name="T6"> </text:span><text:span text:style-name="T7">class</text:span><text:span text:style-name="T6">=</text:span><text:span text:style-name="T8">"mt-12 text-center"</text:span><text:span text:style-name="T4">&gt;</text:span></text:p>
      <text:p text:style-name="P4">        <text:span text:style-name="T4">&lt;</text:span><text:span text:style-name="T5">p</text:span><text:span text:style-name="T6"> </text:span><text:span text:style-name="T7">class</text:span><text:span text:style-name="T6">=</text:span><text:span text:style-name="T8">"text-4xl sm:text-5xm font-bold text-gray-900 mb-4 reveal"</text:span><text:span text:style-name="T4">&gt;</text:span></text:p>
      <text:p text:style-name="P4">          <text:span text:style-name="T6">Vamos juntos transformar esses desafios comlexos em fluxos organizados, seguros e rastreáveis?</text:span></text:p>
      <text:p text:style-name="P4">        <text:span text:style-name="T4">&lt;/</text:span><text:span text:style-name="T5">p</text:span><text:span text:style-name="T4">&gt;</text:span></text:p>
      <text:p text:style-name="P4">      <text:span text:style-name="T4">&lt;/</text:span><text:span text:style-name="T5">div</text:span><text:span text:style-name="T4">&gt;</text:span></text:p>
      <text:p text:style-name="P4">    <text:span text:style-name="T4">&lt;/</text:span><text:span text:style-name="T5">div</text:span><text:span text:style-name="T4">&gt;</text:span></text:p>
      <text:p text:style-name="P6"><text:span text:style-name="T9">  </text:span><text:span text:style-name="T4">&lt;/</text:span><text:span text:style-name="T5">section</text:span><text:span text:style-name="T4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ato" svg:font-family="Lato"/>
    <style:font-face style:name="Lato Black" svg:font-family="'Lato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ato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ato Black" fo:font-family="'Lato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ato" fo:font-family="La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11:01:40.378372400</meta:creation-date>
    <meta:generator>LibreOffice/25.8.3.2$Windows_X86_64 LibreOffice_project/8ca8d55c161d602844f5428fa4b58097424e324e</meta:generator>
    <dc:date>2026-02-01T23:55:18.951783600</dc:date>
    <meta:editing-duration>PT2H26M36S</meta:editing-duration>
    <meta:editing-cycles>4</meta:editing-cycles>
    <meta:document-statistic meta:table-count="0" meta:image-count="0" meta:object-count="0" meta:page-count="3" meta:paragraph-count="90" meta:word-count="512" meta:character-count="4904" meta:non-whitespace-character-count="3612"/>
  </office:meta>
</office:document-meta>
</file>