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/>
    <style:font-face style:name="Lato Black" svg:font-family="'Lato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/>
    <style:font-face style:name="Lato Black" svg:font-family="'Lato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ato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ato Black" fo:font-family="'Lato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ato" fo:font-family="Lato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ato" fo:font-family="Lato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11:01:40.3783724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